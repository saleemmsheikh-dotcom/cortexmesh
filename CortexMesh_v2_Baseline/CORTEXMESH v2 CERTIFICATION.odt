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═══════════════════════════════════════════════════════════════</text:p>
      <text:p text:style-name="Standard"><text:s text:c="11"/>CORTEXMESH v2 CERTIFICATION — SESSION CLOSED</text:p>
      <text:p text:style-name="Standard">═══════════════════════════════════════════════════════════════</text:p>
      <text:p text:style-name="Standard"/>
      <text:p text:style-name="Standard">Date: <text:s text:c="7"/>2026-06-10</text:p>
      <text:p text:style-name="Standard">Time: <text:s text:c="7"/>23:19</text:p>
      <text:p text:style-name="Standard">Status: <text:s text:c="5"/>ACTIVE → ARCHIVE PHASE</text:p>
      <text:p text:style-name="Standard">Board: <text:s text:c="6"/>Kimi / DeepSeek / ChatGPT</text:p>
      <text:p text:style-name="Standard">Vote: <text:s text:c="7"/>Unanimous (3/3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PHASE TRANSITION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FROM: Certification Phase</text:p>
      <text:p text:style-name="Standard">TO: <text:s text:c="2"/>Preservation Phase (Archive)</text:p>
      <text:p text:style-name="Standard"/>
      <text:p text:style-name="Standard">NEXT: v3 Planning Phase (after archive completion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LOCKED SYSTEMS (FROZEN)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CONTRACTS_v2 <text:s text:c="3"/>LOCKED</text:p>
      <text:p text:style-name="Standard">GOVERNANCE_v2 <text:s text:c="2"/>LOCKED</text:p>
      <text:p text:style-name="Standard">CORE_v2 <text:s text:c="8"/>LOCKED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AUTHORIZED ACTIONS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✅ Create v2 baseline archive</text:p>
      <text:p text:style-name="Standard">✅ Populate with certified documents</text:p>
      <text:p text:style-name="Standard">✅ Draft Baseline_Manifest.md</text:p>
      <text:p text:style-name="Standard">✅ Tag repository v2-certified</text:p>
      <text:p text:style-name="Standard">✅ Document known limitations</text:p>
      <text:p text:style-name="Standard"/>
      <text:p text:style-name="Standard">❌ NO v3 development</text:p>
      <text:p text:style-name="Standard">❌ NO modification to certified code</text:p>
      <text:p text:style-name="Standard">❌ NO changes to architectural invariants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BASELINE ARCHIVE STRUCTURE</text:p>
      <text:p text:style-name="Standard"><text:soft-page-break/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CortexMesh_v2_Baseline/</text:p>
      <text:p text:style-name="Standard">├── Baseline_Manifest.md <text:s text:c="9"/>← NEW (ChatGPT recommendation)</text:p>
      <text:p text:style-name="Standard">├── Certification_Record_v2.1.md</text:p>
      <text:p text:style-name="Standard">├── Executive_Record_v1.1.md</text:p>
      <text:p text:style-name="Standard">├── Charter_v1.1.md</text:p>
      <text:p text:style-name="Standard">├── TechSpec_v1.0_Approved_Sections.md</text:p>
      <text:p text:style-name="Standard">├── Known_Limitations.md</text:p>
      <text:p text:style-name="Standard">├── Gate5b_Evidence/</text:p>
      <text:p text:style-name="Standard">├── P0_Remediation_Record/</text:p>
      <text:p text:style-name="Standard">├── Test_Evidence/</text:p>
      <text:p text:style-name="Standard">├── Architectural_Decisions/</text:p>
      <text:p text:style-name="Standard">└── Board_Decisions/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BASELINE_MANIFEST.md TEMPLATE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# CortexMesh v2 Certified Baseline</text:p>
      <text:p text:style-name="Standard"/>
      <text:p text:style-name="Standard">## Certification Date</text:p>
      <text:p text:style-name="Standard">2026-06-10</text:p>
      <text:p text:style-name="Standard"/>
      <text:p text:style-name="Standard">## Board Members</text:p>
      <text:p text:style-name="Standard">- Kimi</text:p>
      <text:p text:style-name="Standard">- DeepSeek</text:p>
      <text:p text:style-name="Standard">- ChatGPT</text:p>
      <text:p text:style-name="Standard"/>
      <text:p text:style-name="Standard">## Included Documents</text:p>
      <text:p text:style-name="Standard">| Document | Version | Status |</text:p>
      <text:p text:style-name="Standard">|----------|---------|--------|</text:p>
      <text:p text:style-name="Standard">| Certification Record | v2.1 | APPROVED |</text:p>
      <text:p text:style-name="Standard">| Executive Record | v1.1 | ACCEPTED |</text:p>
      <text:p text:style-name="Standard">| Charter | v1.1 | APPROVED |</text:p>
      <text:p text:style-name="Standard">| Technical Specification | v1.0 (§2) | APPROVED |</text:p>
      <text:p text:style-name="Standard"/>
      <text:p text:style-name="Standard">## Locked Systems</text:p>
      <text:p text:style-name="Standard">- CONTRACTS_v2</text:p>
      <text:p text:style-name="Standard">- GOVERNANCE_v2</text:p>
      <text:p text:style-name="Standard">- CORE_v2</text:p>
      <text:p text:style-name="Standard"/>
      <text:p text:style-name="Standard">## Certification Status</text:p>
      <text:p text:style-name="Standard">ACTIVE</text:p>
      <text:p text:style-name="Standard"/>
      <text:p text:style-name="Standard">## Known Limitations</text:p>
      <text:p text:style-name="Standard">See Known_Limitations.md</text:p>
      <text:p text:style-name="Standard"/>
      <text:p text:style-name="Standard">## Next Phase</text:p>
      <text:p text:style-name="Standard"><text:soft-page-break/>v3 Planning (after TechSpec completion and Architecture Debt Review)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PRIORITY ORDER (CONFIRMED)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| Priority | Action | Phase |</text:p>
      <text:p text:style-name="Standard">|----------|--------|-------|</text:p>
      <text:p text:style-name="Standard">| P0 | Archive and freeze v2 baseline | Preservation |</text:p>
      <text:p text:style-name="Standard">| P1 | Complete remaining TechSpec sections | Documentation |</text:p>
      <text:p text:style-name="Standard">| P2 | Architecture Debt Review | Review |</text:p>
      <text:p text:style-name="Standard">| P3 | v3 Roadmap | Planning |</text:p>
      <text:p text:style-name="Standard">| P4 | Open v3 development | Development |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>GOVERNANCE STATE</text:p>
      <text:p text:style-name="Standard">───────────────────────────────────────────────────────────────</text:p>
      <text:p text:style-name="Standard"/>
      <text:p text:style-name="Standard">CortexMesh v2 Certification = ACTIVE</text:p>
      <text:p text:style-name="Standard">CortexMesh v2 Baseline <text:s text:c="5"/>= ARCHIVE REQUIRED</text:p>
      <text:p text:style-name="Standard">CortexMesh v3 Development <text:s text:c="2"/>= NOT AUTHORIZED</text:p>
      <text:p text:style-name="Standard"/>
      <text:p text:style-name="Standard">═══════════════════════════════════════════════════════════════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6-10T23:30:59.934768471</meta:creation-date>
    <dc:date>2026-06-10T23:31:53.918970457</dc:date>
    <meta:editing-duration>PT54S</meta:editing-duration>
    <meta:editing-cycles>1</meta:editing-cycles>
    <meta:document-statistic meta:table-count="0" meta:image-count="0" meta:object-count="0" meta:page-count="3" meta:paragraph-count="90" meta:word-count="310" meta:character-count="3149" meta:non-whitespace-character-count="2860"/>
    <meta:generator>LibreOffice/7.2.0.4$MacOSX_X86_64 LibreOffice_project/9a9c6381e3f7a62afc1329bd359cc48accb6435b</meta:generator>
  </office:meta>
</office:document-meta>
</file>